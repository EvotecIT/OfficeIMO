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.08.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0.08.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.08.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0.08.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0.08.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.08.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.08.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0.08.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0.08.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0.08.202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0.08.202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.08.202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rzemysław Kłys</meta:initial-creator>
    <dc:creator>Przemysław Kłys</dc:creator>
    <meta:creation-date>2025-08-20T12:31:33Z</meta:creation-date>
    <dc:date>2026-07-10T08:51:48Z</dc:date>
    <meta:editing-cycles>1</meta:editing-cycles>
    <meta:editing-duration>PT38S</meta:editing-duration>
    <meta:document-statistic meta:paragraph-count="0" meta:word-count="0"/>
  </office:meta>
</office:document-meta>
</file>