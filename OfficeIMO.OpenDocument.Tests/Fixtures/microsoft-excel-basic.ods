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This is tes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Another Test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mmm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DifferentTest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Another on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4">
            <text:p>Test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10</meta:generator>
    <meta:initial-creator>Przemysław Kłys</meta:initial-creator>
    <dc:creator>Przemysław Kłys</dc:creator>
    <meta:creation-date>2022-01-26T22:53:49Z</meta:creation-date>
    <dc:date>2026-07-10T08:38:17Z</dc:date>
  </office:meta>
</office:document-meta>
</file>